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manifest="urn:oasis:names:tc:opendocument:xmlns:manifest:1.0" office:version="1.2">
  <office:automatic-styles/>
  <office:body>
    <office:spreadsheet>
      <table:table table:name="subject-1">
        <table:table-row>
          <table:table-cell office:value-type="string" office:string-value="ac_ppg">
            <text:p>ac_ppg</text:p>
          </table:table-cell>
          <table:table-cell office:value-type="string" office:string-value="raw_adc">
            <text:p>raw_adc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38.0">
            <text:p>-38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34.0">
            <text:p>-3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39">
            <text:p>39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18">
            <text:p>118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32">
            <text:p>13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37">
            <text:p>37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28">
            <text:p>-2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53">
            <text:p>-5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4">
            <text:p>-8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81">
            <text:p>-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79">
            <text:p>-79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26">
            <text:p>-26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7">
            <text:p>-1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26.0">
            <text:p>-26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33">
            <text:p>33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8">
            <text:p>118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7">
            <text:p>3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46">
            <text:p>-4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2">
            <text:p>-5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76">
            <text:p>-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59">
            <text:p>-59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-68">
            <text:p>-68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45">
            <text:p>-4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44">
            <text:p>-4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3">
            <text:p>-3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35">
            <text:p>-35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5.0">
            <text:p>25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7">
            <text:p>-1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26">
            <text:p>2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38">
            <text:p>38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37">
            <text:p>3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53">
            <text:p>-53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52">
            <text:p>-5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44">
            <text:p>-4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35">
            <text:p>-3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28">
            <text:p>-2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6">
            <text:p>-2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5.0">
            <text:p>25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39.0">
            <text:p>-3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33">
            <text:p>33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58">
            <text:p>5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92">
            <text:p>92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8.0">
            <text:p>28.0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27.0">
            <text:p>27.0</text:p>
          </table:table-cell>
          <table:table-cell office:value-type="float" office:value="86">
            <text:p>86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3.0">
            <text:p>23.0</text:p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29">
            <text:p>2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20">
            <text:p>-20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-38">
            <text:p>-38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49">
            <text:p>-4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3">
            <text:p>-63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48">
            <text:p>-48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-52">
            <text:p>-52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38">
            <text:p>-38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39">
            <text:p>-39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38">
            <text:p>-3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23">
            <text:p>-23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59">
            <text:p>5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86">
            <text:p>8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49">
            <text:p>-49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73">
            <text:p>-73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32">
            <text:p>-3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39">
            <text:p>-3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33">
            <text:p>-3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32">
            <text:p>-3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20">
            <text:p>-20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31.0">
            <text:p>-31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53">
            <text:p>5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96">
            <text:p>96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114">
            <text:p>114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31">
            <text:p>3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97">
            <text:p>-97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95">
            <text:p>-9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90">
            <text:p>-9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78">
            <text:p>-7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43">
            <text:p>-43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24">
            <text:p>-2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36">
            <text:p>36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54">
            <text:p>5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17">
            <text:p>11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28">
            <text:p>128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57">
            <text:p>157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57">
            <text:p>15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25">
            <text:p>-2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44">
            <text:p>-44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-26.0">
            <text:p>-26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-89">
            <text:p>-89</text:p>
          </table:table-cell>
        </table:table-row>
        <table:table-row>
          <table:table-cell office:value-type="float" office:value="-26.0">
            <text:p>-26.0</text:p>
          </table:table-cell>
          <table:table-cell office:value-type="float" office:value="-97">
            <text:p>-97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99">
            <text:p>-99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104">
            <text:p>-104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-110">
            <text:p>-110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101">
            <text:p>-101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99">
            <text:p>-9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89">
            <text:p>-8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90">
            <text:p>-9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-68">
            <text:p>-68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53">
            <text:p>-53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26">
            <text:p>-26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2">
            <text:p>-2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25">
            <text:p>-25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30.0">
            <text:p>-30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31">
            <text:p>3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43">
            <text:p>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96">
            <text:p>9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76">
            <text:p>1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3">
            <text:p>19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98">
            <text:p>19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2">
            <text:p>16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83">
            <text:p>8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">
            <text:p>-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">
            <text:p>-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2">
            <text:p>-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">
            <text:p>-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">
            <text:p>-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">
            <text:p>-1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">
            <text:p>-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6">
            <text:p>-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">
            <text:p>-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">
            <text:p>-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6">
            <text:p>-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">
            <text:p>-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2">
            <text:p>-1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">
            <text:p>-1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">
            <text:p>-1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6">
            <text:p>-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7">
            <text:p>-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">
            <text:p>-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0">
            <text:p>-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">
            <text:p>-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9">
            <text:p>-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2">
            <text:p>-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">
            <text:p>-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2">
            <text:p>-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9">
            <text:p>-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9">
            <text:p>-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">
            <text:p>-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">
            <text:p>-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">
            <text:p>-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">
            <text:p>-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">
            <text:p>-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">
            <text:p>-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">
            <text:p>-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">
            <text:p>-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">
            <text:p>-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">
            <text:p>-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3">
            <text:p>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8">
            <text:p>1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6">
            <text:p>1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2">
            <text:p>1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1">
            <text:p>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1">
            <text:p>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">
            <text:p>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">
            <text:p>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">
            <text:p>-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">
            <text:p>-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">
            <text:p>-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4">
            <text:p>-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1">
            <text:p>-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2">
            <text:p>-1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">
            <text:p>-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5">
            <text:p>-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">
            <text:p>-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8">
            <text:p>-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8">
            <text:p>-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1">
            <text:p>-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">
            <text:p>-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7">
            <text:p>-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2">
            <text:p>-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4">
            <text:p>-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">
            <text:p>-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0">
            <text:p>-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1">
            <text:p>-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9">
            <text:p>-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">
            <text:p>-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0">
            <text:p>-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4">
            <text:p>-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">
            <text:p>-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">
            <text:p>-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1">
            <text:p>-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">
            <text:p>-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">
            <text:p>-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">
            <text:p>-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">
            <text:p>-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">
            <text:p>-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">
            <text:p>-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">
            <text:p>-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">
            <text:p>-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">
            <text:p>-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">
            <text:p>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8">
            <text:p>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4">
            <text:p>1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6">
            <text:p>1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8">
            <text:p>1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1">
            <text:p>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1">
            <text:p>1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2">
            <text:p>1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1">
            <text:p>1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2">
            <text:p>1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">
            <text:p>-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">
            <text:p>-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">
            <text:p>-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">
            <text:p>-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1">
            <text:p>-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">
            <text:p>-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9">
            <text:p>-1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">
            <text:p>-1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1">
            <text:p>-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">
            <text:p>-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">
            <text:p>-1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">
            <text:p>-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1">
            <text:p>-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">
            <text:p>-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">
            <text:p>-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">
            <text:p>-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">
            <text:p>-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4">
            <text:p>-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">
            <text:p>-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6">
            <text:p>-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">
            <text:p>-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">
            <text:p>-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">
            <text:p>-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2">
            <text:p>-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5">
            <text:p>-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">
            <text:p>-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">
            <text:p>-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">
            <text:p>-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">
            <text:p>-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">
            <text:p>-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">
            <text:p>-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">
            <text:p>-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">
            <text:p>-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">
            <text:p>-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">
            <text:p>-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">
            <text:p>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1">
            <text:p>1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7">
            <text:p>3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0">
            <text:p>3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7">
            <text:p>4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3">
            <text:p>5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1">
            <text:p>6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2">
            <text:p>4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07">
            <text:p>-8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65">
            <text:p>-10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0">
            <text:p>-10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99">
            <text:p>-9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7">
            <text:p>-9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7">
            <text:p>-9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08">
            <text:p>-9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79">
            <text:p>-8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3">
            <text:p>-8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25">
            <text:p>-8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99">
            <text:p>-7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73">
            <text:p>-7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9">
            <text:p>-7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27">
            <text:p>-7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4">
            <text:p>-7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83">
            <text:p>-6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1">
            <text:p>-6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0">
            <text:p>-6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0">
            <text:p>-6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0">
            <text:p>-6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2">
            <text:p>-5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4">
            <text:p>-5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5">
            <text:p>-5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9">
            <text:p>-5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1">
            <text:p>-5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5">
            <text:p>-4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0">
            <text:p>-4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6">
            <text:p>-4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0">
            <text:p>-4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6">
            <text:p>-4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3">
            <text:p>-4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9">
            <text:p>-4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7">
            <text:p>-3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5">
            <text:p>-3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1">
            <text:p>-3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9">
            <text:p>-3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8">
            <text:p>-3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8">
            <text:p>-3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8">
            <text:p>-3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6">
            <text:p>-3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7">
            <text:p>-3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6">
            <text:p>-2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0">
            <text:p>-2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9">
            <text:p>-2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0">
            <text:p>-2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2">
            <text:p>-2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4">
            <text:p>-2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6">
            <text:p>-2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8">
            <text:p>-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1">
            <text:p>-2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2">
            <text:p>-2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7">
            <text:p>-2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1">
            <text:p>-2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4">
            <text:p>-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7">
            <text:p>-1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0">
            <text:p>-1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5">
            <text:p>-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9">
            <text:p>-1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3">
            <text:p>-1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8">
            <text:p>-1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3">
            <text:p>-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7">
            <text:p>-1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4">
            <text:p>-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7">
            <text:p>-1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2">
            <text:p>-1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8">
            <text:p>-1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3">
            <text:p>-1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0">
            <text:p>-1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5">
            <text:p>-1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2">
            <text:p>-1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">
            <text:p>-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">
            <text:p>-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">
            <text:p>-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8">
            <text:p>-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">
            <text:p>-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0">
            <text:p>-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9">
            <text:p>-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4">
            <text:p>-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2">
            <text:p>-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">
            <text:p>-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6">
            <text:p>-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">
            <text:p>-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2">
            <text:p>-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9">
            <text:p>-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6">
            <text:p>-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">
            <text:p>-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">
            <text:p>-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">
            <text:p>-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7">
            <text:p>-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">
            <text:p>-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">
            <text:p>-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">
            <text:p>-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">
            <text:p>-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">
            <text:p>-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">
            <text:p>-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">
            <text:p>-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">
            <text:p>-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">
            <text:p>-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">
            <text:p>-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">
            <text:p>-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">
            <text:p>-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4">
            <text:p>-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">
            <text:p>-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">
            <text:p>-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">
            <text:p>-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">
            <text:p>-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">
            <text:p>-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">
            <text:p>-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">
            <text:p>-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">
            <text:p>-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">
            <text:p>-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">
            <text:p>-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">
            <text:p>-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">
            <text:p>-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">
            <text:p>-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">
            <text:p>-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">
            <text:p>-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">
            <text:p>-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">
            <text:p>-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">
            <text:p>-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">
            <text:p>-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">
            <text:p>-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">
            <text:p>-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">
            <text:p>-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">
            <text:p>-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">
            <text:p>-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">
            <text:p>-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">
            <text:p>-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">
            <text:p>-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">
            <text:p>-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</table:table>
      <table:table table:name="subject-2">
        <table:table-row>
          <table:table-cell office:value-type="string" office:string-value="ac_ppg">
            <text:p>ac_ppg</text:p>
          </table:table-cell>
          <table:table-cell office:value-type="string" office:string-value="raw_adc">
            <text:p>raw_adc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30.0">
            <text:p>-30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31.0">
            <text:p>-31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32.0">
            <text:p>-3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39">
            <text:p>39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18">
            <text:p>118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32">
            <text:p>13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37">
            <text:p>3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28">
            <text:p>-2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53">
            <text:p>-5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28.0">
            <text:p>28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-84">
            <text:p>-84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81">
            <text:p>-81</text:p>
          </table:table-cell>
        </table:table-row>
        <table:table-row>
          <table:table-cell office:value-type="float" office:value="27.0">
            <text:p>27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28.0">
            <text:p>28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23.0">
            <text:p>23.0</text:p>
          </table:table-cell>
          <table:table-cell office:value-type="float" office:value="-79">
            <text:p>-7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27.0">
            <text:p>27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26">
            <text:p>-26</text:p>
          </table:table-cell>
        </table:table-row>
        <table:table-row>
          <table:table-cell office:value-type="float" office:value="23.0">
            <text:p>23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38.0">
            <text:p>38.0</text:p>
          </table:table-cell>
          <table:table-cell office:value-type="float" office:value="-17">
            <text:p>-17</text:p>
          </table:table-cell>
        </table:table-row>
        <table:table-row>
          <table:table-cell office:value-type="float" office:value="38.0">
            <text:p>38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29.0">
            <text:p>29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39.0">
            <text:p>39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37.0">
            <text:p>3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35.0">
            <text:p>35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2.0">
            <text:p>3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9.0">
            <text:p>29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28.0">
            <text:p>2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31.0">
            <text:p>31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32.0">
            <text:p>-3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36.0">
            <text:p>-36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-29.0">
            <text:p>-29.0</text:p>
          </table:table-cell>
          <table:table-cell office:value-type="float" office:value="33">
            <text:p>33</text:p>
          </table:table-cell>
        </table:table-row>
        <table:table-row>
          <table:table-cell office:value-type="float" office:value="-30.0">
            <text:p>-30.0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-33.0">
            <text:p>-33.0</text:p>
          </table:table-cell>
          <table:table-cell office:value-type="float" office:value="118">
            <text:p>118</text:p>
          </table:table-cell>
        </table:table-row>
        <table:table-row>
          <table:table-cell office:value-type="float" office:value="-26.0">
            <text:p>-26.0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-28.0">
            <text:p>-28.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37">
            <text:p>37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46">
            <text:p>-46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-52">
            <text:p>-52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26.0">
            <text:p>-26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-76">
            <text:p>-76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59">
            <text:p>-59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68">
            <text:p>-68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-45">
            <text:p>-4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44">
            <text:p>-44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33">
            <text:p>-33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-35">
            <text:p>-35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29.0">
            <text:p>-29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32.0">
            <text:p>-3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37.0">
            <text:p>-37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41.0">
            <text:p>-41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37.0">
            <text:p>-3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36.0">
            <text:p>-3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27.0">
            <text:p>-27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28.0">
            <text:p>-28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32.0">
            <text:p>-32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30.0">
            <text:p>-30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32.0">
            <text:p>-3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28.0">
            <text:p>-2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1.0">
            <text:p>3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36.0">
            <text:p>36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-17">
            <text:p>-17</text:p>
          </table:table-cell>
        </table:table-row>
        <table:table-row>
          <table:table-cell office:value-type="float" office:value="31.0">
            <text:p>31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25.0">
            <text:p>25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35.0">
            <text:p>35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25.0">
            <text:p>25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27.0">
            <text:p>27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30.0">
            <text:p>30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26">
            <text:p>26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38">
            <text:p>38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7">
            <text:p>37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53">
            <text:p>-5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52">
            <text:p>-5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44">
            <text:p>-4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35">
            <text:p>-35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28">
            <text:p>-28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26">
            <text:p>-26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.0">
            <text:p>2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3.0">
            <text:p>23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35.0">
            <text:p>3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7.0">
            <text:p>3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5.0">
            <text:p>35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7.0">
            <text:p>2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9.0">
            <text:p>2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33">
            <text:p>3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92">
            <text:p>9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2.0">
            <text:p>22.0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86">
            <text:p>86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29">
            <text:p>29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23.0">
            <text:p>2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20">
            <text:p>-2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38">
            <text:p>-3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49">
            <text:p>-4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3">
            <text:p>-6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48">
            <text:p>-4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2">
            <text:p>-5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38">
            <text:p>-3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39">
            <text:p>-39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38">
            <text:p>-3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23">
            <text:p>-2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59">
            <text:p>59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-37.0">
            <text:p>-37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-29.0">
            <text:p>-29.0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-34.0">
            <text:p>-34.0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-25.0">
            <text:p>-25.0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-36.0">
            <text:p>-36.0</text:p>
          </table:table-cell>
          <table:table-cell office:value-type="float" office:value="86">
            <text:p>86</text:p>
          </table:table-cell>
        </table:table-row>
        <table:table-row>
          <table:table-cell office:value-type="float" office:value="-36.0">
            <text:p>-36.0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-30.0">
            <text:p>-30.0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-32.0">
            <text:p>-32.0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49">
            <text:p>-4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73">
            <text:p>-7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57">
            <text:p>-5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51">
            <text:p>-51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32">
            <text:p>-32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39">
            <text:p>-39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33">
            <text:p>-33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32">
            <text:p>-32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20">
            <text:p>-20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26.0">
            <text:p>26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24.0">
            <text:p>2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53">
            <text:p>5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96">
            <text:p>96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14">
            <text:p>11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1">
            <text:p>3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97">
            <text:p>-9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95">
            <text:p>-9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90">
            <text:p>-90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78">
            <text:p>-78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43">
            <text:p>-4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24">
            <text:p>-2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34">
            <text:p>34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36">
            <text:p>36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54">
            <text:p>54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23.0">
            <text:p>23.0</text:p>
          </table:table-cell>
          <table:table-cell office:value-type="float" office:value="117">
            <text:p>11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28">
            <text:p>128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57">
            <text:p>15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57">
            <text:p>157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-24.0">
            <text:p>-24.0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-30.0">
            <text:p>-30.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28.0">
            <text:p>-28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26.0">
            <text:p>-26.0</text:p>
          </table:table-cell>
          <table:table-cell office:value-type="float" office:value="-25">
            <text:p>-25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44">
            <text:p>-44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89">
            <text:p>-8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97">
            <text:p>-97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99">
            <text:p>-9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04">
            <text:p>-10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10">
            <text:p>-11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01">
            <text:p>-10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99">
            <text:p>-99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89">
            <text:p>-8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90">
            <text:p>-90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7">
            <text:p>-77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75">
            <text:p>-7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8">
            <text:p>-68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53">
            <text:p>-53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26">
            <text:p>-2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22">
            <text:p>-2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25">
            <text:p>-2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31">
            <text:p>3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43">
            <text:p>43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96">
            <text:p>96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76">
            <text:p>17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93">
            <text:p>19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98">
            <text:p>19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62">
            <text:p>16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83">
            <text:p>8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31">
            <text:p>3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43">
            <text:p>-43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93">
            <text:p>-9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07">
            <text:p>-10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13">
            <text:p>-11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16">
            <text:p>-11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14">
            <text:p>-11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13">
            <text:p>-11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16">
            <text:p>-116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14">
            <text:p>-11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12">
            <text:p>-112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109">
            <text:p>-10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07">
            <text:p>-107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106">
            <text:p>-106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97">
            <text:p>-97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95">
            <text:p>-95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100">
            <text:p>-100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95">
            <text:p>-95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89">
            <text:p>-89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79">
            <text:p>-7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79">
            <text:p>-79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63">
            <text:p>-63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-56">
            <text:p>-5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43">
            <text:p>-43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39">
            <text:p>-39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0">
            <text:p>-2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22.0">
            <text:p>-2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28">
            <text:p>2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83">
            <text:p>8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111">
            <text:p>11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32">
            <text:p>13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63">
            <text:p>16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88">
            <text:p>18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76">
            <text:p>17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74">
            <text:p>17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59">
            <text:p>59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39">
            <text:p>39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39">
            <text:p>-3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84">
            <text:p>-84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101">
            <text:p>-10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02">
            <text:p>-10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03">
            <text:p>-10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15">
            <text:p>-1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04">
            <text:p>-10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08">
            <text:p>-10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08">
            <text:p>-10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01">
            <text:p>-10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103">
            <text:p>-10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97">
            <text:p>-97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95">
            <text:p>-9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90">
            <text:p>-9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81">
            <text:p>-8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89">
            <text:p>-8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93">
            <text:p>-9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90">
            <text:p>-9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84">
            <text:p>-8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78">
            <text:p>-78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81">
            <text:p>-81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78">
            <text:p>-78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4">
            <text:p>-6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43">
            <text:p>-4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45">
            <text:p>-4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26">
            <text:p>-26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26">
            <text:p>26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31">
            <text:p>3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43">
            <text:p>43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18">
            <text:p>118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174">
            <text:p>174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81">
            <text:p>181</text:p>
          </table:table-cell>
        </table:table-row>
        <table:table-row>
          <table:table-cell office:value-type="float" office:value="18.0">
            <text:p>18.0</text:p>
          </table:table-cell>
          <table:table-cell office:value-type="float" office:value="191">
            <text:p>19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192">
            <text:p>19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32">
            <text:p>13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-32.0">
            <text:p>-32.0</text:p>
          </table:table-cell>
          <table:table-cell office:value-type="float" office:value="43">
            <text:p>43</text:p>
          </table:table-cell>
        </table:table-row>
        <table:table-row>
          <table:table-cell office:value-type="float" office:value="-30.0">
            <text:p>-30.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30">
            <text:p>-30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71">
            <text:p>-7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91">
            <text:p>-91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95">
            <text:p>-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01">
            <text:p>-10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110">
            <text:p>-11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19">
            <text:p>-11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28">
            <text:p>-128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131">
            <text:p>-131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18">
            <text:p>-11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17">
            <text:p>-117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-123">
            <text:p>-12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111">
            <text:p>-111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110">
            <text:p>-110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104">
            <text:p>-104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104">
            <text:p>-104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-104">
            <text:p>-104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-96">
            <text:p>-96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85">
            <text:p>-85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72">
            <text:p>-72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65">
            <text:p>-6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62">
            <text:p>-6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1">
            <text:p>-61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43">
            <text:p>-43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41">
            <text:p>-4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35">
            <text:p>-3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17">
            <text:p>-1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-14">
            <text:p>-14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19.0">
            <text:p>-19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7.0">
            <text:p>17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7.0">
            <text:p>27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33">
            <text:p>33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21.0">
            <text:p>21.0</text:p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16.0">
            <text:p>16.0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85">
            <text:p>18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242">
            <text:p>24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268">
            <text:p>26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17">
            <text:p>317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-17.0">
            <text:p>-17.0</text:p>
          </table:table-cell>
          <table:table-cell office:value-type="float" office:value="467">
            <text:p>46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533">
            <text:p>533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611">
            <text:p>611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412">
            <text:p>412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807">
            <text:p>-80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065">
            <text:p>-106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030">
            <text:p>-1030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999">
            <text:p>-99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967">
            <text:p>-96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937">
            <text:p>-937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908">
            <text:p>-90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879">
            <text:p>-87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853">
            <text:p>-853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825">
            <text:p>-82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799">
            <text:p>-79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773">
            <text:p>-773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749">
            <text:p>-749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727">
            <text:p>-727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704">
            <text:p>-704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683">
            <text:p>-683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-661">
            <text:p>-66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640">
            <text:p>-64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620">
            <text:p>-62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600">
            <text:p>-600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582">
            <text:p>-582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564">
            <text:p>-564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545">
            <text:p>-545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529">
            <text:p>-52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511">
            <text:p>-511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495">
            <text:p>-495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480">
            <text:p>-480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466">
            <text:p>-466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450">
            <text:p>-450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436">
            <text:p>-436</text:p>
          </table:table-cell>
        </table:table-row>
        <table:table-row>
          <table:table-cell office:value-type="float" office:value="-20.0">
            <text:p>-20.0</text:p>
          </table:table-cell>
          <table:table-cell office:value-type="float" office:value="-423">
            <text:p>-423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409">
            <text:p>-409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397">
            <text:p>-397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385">
            <text:p>-385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371">
            <text:p>-37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59">
            <text:p>-35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348">
            <text:p>-34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338">
            <text:p>-33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328">
            <text:p>-328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316">
            <text:p>-31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307">
            <text:p>-307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296">
            <text:p>-296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290">
            <text:p>-290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279">
            <text:p>-279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70">
            <text:p>-27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262">
            <text:p>-262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254">
            <text:p>-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246">
            <text:p>-246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238">
            <text:p>-23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231">
            <text:p>-23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222">
            <text:p>-2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217">
            <text:p>-217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211">
            <text:p>-211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204">
            <text:p>-204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97">
            <text:p>-197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190">
            <text:p>-190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185">
            <text:p>-185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179">
            <text:p>-179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73">
            <text:p>-173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168">
            <text:p>-16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63">
            <text:p>-163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157">
            <text:p>-157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154">
            <text:p>-15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47">
            <text:p>-147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142">
            <text:p>-142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38">
            <text:p>-13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33">
            <text:p>-133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30">
            <text:p>-13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125">
            <text:p>-12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22">
            <text:p>-12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118">
            <text:p>-11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114">
            <text:p>-11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10">
            <text:p>-11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108">
            <text:p>-108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03">
            <text:p>-103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100">
            <text:p>-100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99">
            <text:p>-9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94">
            <text:p>-94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92">
            <text:p>-9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88">
            <text:p>-88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86">
            <text:p>-86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83">
            <text:p>-83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82">
            <text:p>-8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79">
            <text:p>-79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6">
            <text:p>-76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74">
            <text:p>-74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70">
            <text:p>-70</text:p>
          </table:table-cell>
        </table:table-row>
        <table:table-row>
          <table:table-cell office:value-type="float" office:value="-23.0">
            <text:p>-23.0</text:p>
          </table:table-cell>
          <table:table-cell office:value-type="float" office:value="-69">
            <text:p>-69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67">
            <text:p>-67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6">
            <text:p>-6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63">
            <text:p>-6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60">
            <text:p>-6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58">
            <text:p>-5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55">
            <text:p>-55</text:p>
          </table:table-cell>
        </table:table-row>
        <table:table-row>
          <table:table-cell office:value-type="float" office:value="20.0">
            <text:p>20.0</text:p>
          </table:table-cell>
          <table:table-cell office:value-type="float" office:value="-54">
            <text:p>-54</text:p>
          </table:table-cell>
        </table:table-row>
        <table:table-row>
          <table:table-cell office:value-type="float" office:value="19.0">
            <text:p>19.0</text:p>
          </table:table-cell>
          <table:table-cell office:value-type="float" office:value="-52">
            <text:p>-52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-47">
            <text:p>-47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46">
            <text:p>-4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44">
            <text:p>-44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43">
            <text:p>-43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-42">
            <text:p>-4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39">
            <text:p>-39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37">
            <text:p>-37</text:p>
          </table:table-cell>
        </table:table-row>
        <table:table-row>
          <table:table-cell office:value-type="float" office:value="-9.0">
            <text:p>-9.0</text:p>
          </table:table-cell>
          <table:table-cell office:value-type="float" office:value="-36">
            <text:p>-3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34">
            <text:p>-34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32">
            <text:p>-32</text:p>
          </table:table-cell>
        </table:table-row>
        <table:table-row>
          <table:table-cell office:value-type="float" office:value="-13.0">
            <text:p>-13.0</text:p>
          </table:table-cell>
          <table:table-cell office:value-type="float" office:value="-32">
            <text:p>-32</text:p>
          </table:table-cell>
        </table:table-row>
        <table:table-row>
          <table:table-cell office:value-type="float" office:value="-15.0">
            <text:p>-15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-16.0">
            <text:p>-16.0</text:p>
          </table:table-cell>
          <table:table-cell office:value-type="float" office:value="-31">
            <text:p>-31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29">
            <text:p>-29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28">
            <text:p>-28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7">
            <text:p>-27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25">
            <text:p>-2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24">
            <text:p>-24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23">
            <text:p>-23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24">
            <text:p>-24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22">
            <text:p>-22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-21">
            <text:p>-21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20">
            <text:p>-2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19">
            <text:p>-19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7">
            <text:p>-17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18">
            <text:p>-1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15">
            <text:p>-15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2">
            <text:p>-12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6">
            <text:p>-1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13">
            <text:p>-13</text:p>
          </table:table-cell>
        </table:table-row>
        <table:table-row>
          <table:table-cell office:value-type="float" office:value="-4.0">
            <text:p>-4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11">
            <text:p>-11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2.0">
            <text:p>-12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10.0">
            <text:p>-10.0</text:p>
          </table:table-cell>
          <table:table-cell office:value-type="float" office:value="-10">
            <text:p>-10</text:p>
          </table:table-cell>
        </table:table-row>
        <table:table-row>
          <table:table-cell office:value-type="float" office:value="-21.0">
            <text:p>-21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8.0">
            <text:p>-18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9">
            <text:p>-9</text:p>
          </table:table-cell>
        </table:table-row>
        <table:table-row>
          <table:table-cell office:value-type="float" office:value="-11.0">
            <text:p>-11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-14.0">
            <text:p>-14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8">
            <text:p>-8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7">
            <text:p>-7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6.0">
            <text:p>-6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-6">
            <text:p>-6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5.0">
            <text:p>-5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-1.0">
            <text:p>-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8.0">
            <text:p>-8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3.0">
            <text:p>-3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-7.0">
            <text:p>-7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-4">
            <text:p>-4</text:p>
          </table:table-cell>
        </table:table-row>
        <table:table-row>
          <table:table-cell office:value-type="float" office:value="-2.0">
            <text:p>-2.0</text:p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6">
            <text:p>1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1">
            <text:p>2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6">
            <text:p>2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1">
            <text:p>2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7">
            <text:p>3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1">
            <text:p>3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3">
            <text:p>3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1">
            <text:p>2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8">
            <text:p>2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2">
            <text:p>2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6">
            <text:p>2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6">
            <text:p>2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8">
            <text:p>2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0">
            <text:p>5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9">
            <text:p>6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4">
            <text:p>7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0">
            <text:p>9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1">
            <text:p>4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55">
            <text:p>-6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57">
            <text:p>-7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29">
            <text:p>-7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6">
            <text:p>-7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85">
            <text:p>-6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2">
            <text:p>-6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2">
            <text:p>-6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1">
            <text:p>-6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4">
            <text:p>-6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4">
            <text:p>-5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5">
            <text:p>-5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7">
            <text:p>-5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1">
            <text:p>-5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4">
            <text:p>-5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7">
            <text:p>-4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2">
            <text:p>-4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7">
            <text:p>-4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2">
            <text:p>-4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7">
            <text:p>-4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4">
            <text:p>-4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1">
            <text:p>-4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7">
            <text:p>-3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4">
            <text:p>-3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4">
            <text:p>-3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1">
            <text:p>-3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0">
            <text:p>-3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9">
            <text:p>-3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8">
            <text:p>-3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9">
            <text:p>-3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8">
            <text:p>-3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9">
            <text:p>-2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0">
            <text:p>-2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2">
            <text:p>-2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3">
            <text:p>-2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5">
            <text:p>-2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6">
            <text:p>-2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9">
            <text:p>-2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0">
            <text:p>-2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1">
            <text:p>-2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4">
            <text:p>-2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8">
            <text:p>-2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1">
            <text:p>-2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5">
            <text:p>-2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8">
            <text:p>-1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2">
            <text:p>-1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6">
            <text:p>-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0">
            <text:p>-1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5">
            <text:p>-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9">
            <text:p>-1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4">
            <text:p>-1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8">
            <text:p>-1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4">
            <text:p>-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8">
            <text:p>-1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4">
            <text:p>-1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0">
            <text:p>-1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6">
            <text:p>-1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8">
            <text:p>-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48">
            <text:p>13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1">
            <text:p>6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1">
            <text:p>-5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0">
            <text:p>-10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16">
            <text:p>-14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17">
            <text:p>-17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20">
            <text:p>-18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63">
            <text:p>-17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08">
            <text:p>-17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54">
            <text:p>-16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03">
            <text:p>-16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53">
            <text:p>-15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04">
            <text:p>-15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57">
            <text:p>-14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12">
            <text:p>-14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68">
            <text:p>-13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25">
            <text:p>-13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3">
            <text:p>-12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3">
            <text:p>-12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64">
            <text:p>-11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09">
            <text:p>-10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60">
            <text:p>-8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24">
            <text:p>-7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90">
            <text:p>-5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40">
            <text:p>-4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1">
            <text:p>-3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6">
            <text:p>-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">
            <text:p>-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">
            <text:p>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1">
            <text:p>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5">
            <text:p>2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1">
            <text:p>3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8">
            <text:p>4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0">
            <text:p>5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0">
            <text:p>6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1">
            <text:p>7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6">
            <text:p>7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7">
            <text:p>8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35">
            <text:p>8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4">
            <text:p>8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4">
            <text:p>8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1">
            <text:p>8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4">
            <text:p>8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6">
            <text:p>8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7">
            <text:p>7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5">
            <text:p>7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4">
            <text:p>7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4">
            <text:p>6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3">
            <text:p>6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3">
            <text:p>6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3">
            <text:p>5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9">
            <text:p>4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5">
            <text:p>4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8">
            <text:p>4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0">
            <text:p>3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8">
            <text:p>3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0">
            <text:p>2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7">
            <text:p>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7">
            <text:p>1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2">
            <text:p>1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">
            <text:p>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">
            <text:p>-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">
            <text:p>-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">
            <text:p>-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1">
            <text:p>-1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5">
            <text:p>-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9">
            <text:p>-2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5">
            <text:p>-2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4">
            <text:p>-2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9">
            <text:p>-3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5">
            <text:p>-3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6">
            <text:p>-4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5">
            <text:p>-4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2">
            <text:p>-4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5">
            <text:p>-4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9">
            <text:p>-5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2">
            <text:p>-5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7">
            <text:p>-5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8">
            <text:p>-5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6">
            <text:p>-5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2">
            <text:p>-5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5">
            <text:p>-5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3">
            <text:p>-5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4">
            <text:p>-5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8">
            <text:p>-5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4">
            <text:p>-4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5">
            <text:p>-4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6">
            <text:p>-4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2">
            <text:p>-4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3">
            <text:p>-4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7">
            <text:p>-4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5">
            <text:p>-3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7">
            <text:p>-3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9">
            <text:p>-2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7">
            <text:p>-1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7">
            <text:p>1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0">
            <text:p>4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3">
            <text:p>6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11">
            <text:p>10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81">
            <text:p>13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71">
            <text:p>17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60">
            <text:p>20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8">
            <text:p>3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7">
            <text:p>3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6">
            <text:p>3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8">
            <text:p>3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7">
            <text:p>3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7">
            <text:p>3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2">
            <text:p>2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6">
            <text:p>2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8">
            <text:p>2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8">
            <text:p>1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1">
            <text:p>1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6">
            <text:p>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8">
            <text:p>1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8">
            <text:p>1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4">
            <text:p>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8">
            <text:p>1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3">
            <text:p>1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6">
            <text:p>1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0">
            <text:p>1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9">
            <text:p>1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6">
            <text:p>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8">
            <text:p>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6">
            <text:p>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1">
            <text:p>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">
            <text:p>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3">
            <text:p>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">
            <text:p>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">
            <text:p>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">
            <text:p>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">
            <text:p>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">
            <text:p>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">
            <text:p>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">
            <text:p>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">
            <text:p>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4">
            <text:p>3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63">
            <text:p>14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17">
            <text:p>9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6">
            <text:p>4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">
            <text:p>-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3">
            <text:p>-3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5">
            <text:p>-6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4">
            <text:p>-9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2">
            <text:p>-10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05">
            <text:p>-12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70">
            <text:p>-12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97">
            <text:p>-12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91">
            <text:p>-12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5">
            <text:p>-12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3">
            <text:p>-11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9">
            <text:p>-10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28">
            <text:p>-10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9">
            <text:p>-9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62">
            <text:p>-8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4">
            <text:p>-7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8">
            <text:p>-7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7">
            <text:p>-6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6">
            <text:p>-5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4">
            <text:p>-5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8">
            <text:p>-4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1">
            <text:p>-4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4">
            <text:p>-3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3">
            <text:p>-3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6">
            <text:p>-2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5">
            <text:p>-2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0">
            <text:p>-2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8">
            <text:p>-1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1">
            <text:p>-1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2">
            <text:p>-1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7">
            <text:p>-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">
            <text:p>-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8">
            <text:p>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1">
            <text:p>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1">
            <text:p>3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7">
            <text:p>3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7">
            <text:p>3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1">
            <text:p>3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0">
            <text:p>3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0">
            <text:p>2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2">
            <text:p>2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3">
            <text:p>1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7">
            <text:p>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0">
            <text:p>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">
            <text:p>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">
            <text:p>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">
            <text:p>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4">
            <text:p>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1">
            <text:p>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2">
            <text:p>1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6">
            <text:p>1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5">
            <text:p>2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6">
            <text:p>3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7">
            <text:p>4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6">
            <text:p>5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7">
            <text:p>6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0">
            <text:p>8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87">
            <text:p>10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67">
            <text:p>13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79">
            <text:p>16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44">
            <text:p>11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4">
            <text:p>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5">
            <text:p>1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">
            <text:p>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1">
            <text:p>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9">
            <text:p>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">
            <text:p>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">
            <text:p>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">
            <text:p>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">
            <text:p>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">
            <text:p>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2">
            <text:p>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7">
            <text:p>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">
            <text:p>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">
            <text:p>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">
            <text:p>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">
            <text:p>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">
            <text:p>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11">
            <text:p>14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8">
            <text:p>8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7">
            <text:p>3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">
            <text:p>-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6">
            <text:p>-3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0">
            <text:p>-7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5">
            <text:p>-9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1">
            <text:p>-10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00">
            <text:p>-12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62">
            <text:p>-12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76">
            <text:p>-12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2">
            <text:p>-12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1">
            <text:p>-12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7">
            <text:p>-11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6">
            <text:p>-1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2">
            <text:p>-10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6">
            <text:p>-9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4">
            <text:p>-8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63">
            <text:p>-7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8">
            <text:p>-6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0">
            <text:p>-5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8">
            <text:p>-4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1">
            <text:p>-4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5">
            <text:p>-3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1">
            <text:p>-2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9">
            <text:p>-1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6">
            <text:p>-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">
            <text:p>-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">
            <text:p>-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">
            <text:p>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8">
            <text:p>2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5">
            <text:p>2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2">
            <text:p>3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2">
            <text:p>3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5">
            <text:p>3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7">
            <text:p>3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0">
            <text:p>4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4">
            <text:p>4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3">
            <text:p>4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4">
            <text:p>5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3">
            <text:p>5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9">
            <text:p>5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3">
            <text:p>5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2">
            <text:p>5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8">
            <text:p>5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5">
            <text:p>5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5">
            <text:p>5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6">
            <text:p>5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6">
            <text:p>5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2">
            <text:p>5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7">
            <text:p>4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8">
            <text:p>4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0">
            <text:p>3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3">
            <text:p>2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7">
            <text:p>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8">
            <text:p>2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2">
            <text:p>2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0">
            <text:p>3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4">
            <text:p>4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5">
            <text:p>5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2">
            <text:p>6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5">
            <text:p>8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6">
            <text:p>10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09">
            <text:p>13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84">
            <text:p>14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7">
            <text:p>-1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7">
            <text:p>-2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0">
            <text:p>-2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3">
            <text:p>-2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6">
            <text:p>-1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1">
            <text:p>-1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4">
            <text:p>-1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8">
            <text:p>-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4">
            <text:p>-1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7">
            <text:p>-1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1">
            <text:p>-1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8">
            <text:p>-1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2">
            <text:p>-1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7">
            <text:p>-1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3">
            <text:p>-1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7">
            <text:p>-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4">
            <text:p>-1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0">
            <text:p>-1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5">
            <text:p>-1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2">
            <text:p>-1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">
            <text:p>-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">
            <text:p>-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1">
            <text:p>-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6">
            <text:p>-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">
            <text:p>-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0">
            <text:p>-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8">
            <text:p>-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">
            <text:p>-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">
            <text:p>-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9">
            <text:p>-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6">
            <text:p>-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">
            <text:p>-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0">
            <text:p>-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7">
            <text:p>-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6">
            <text:p>-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3">
            <text:p>-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8">
            <text:p>-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7">
            <text:p>-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">
            <text:p>-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">
            <text:p>-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9">
            <text:p>-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9">
            <text:p>-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">
            <text:p>-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">
            <text:p>-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">
            <text:p>-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">
            <text:p>-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">
            <text:p>-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">
            <text:p>-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">
            <text:p>-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">
            <text:p>-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">
            <text:p>-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">
            <text:p>-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">
            <text:p>-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">
            <text:p>-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">
            <text:p>-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">
            <text:p>-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">
            <text:p>-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">
            <text:p>-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">
            <text:p>-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">
            <text:p>-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">
            <text:p>-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">
            <text:p>-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">
            <text:p>-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">
            <text:p>-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">
            <text:p>-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">
            <text:p>-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">
            <text:p>-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">
            <text:p>-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">
            <text:p>-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9">
            <text:p>8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0">
            <text:p>13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8">
            <text:p>7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">
            <text:p>-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8">
            <text:p>-4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76">
            <text:p>-7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88">
            <text:p>-9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2">
            <text:p>-11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0">
            <text:p>-12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43">
            <text:p>-13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67">
            <text:p>-13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62">
            <text:p>-13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38">
            <text:p>-13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91">
            <text:p>-12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7">
            <text:p>-1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7">
            <text:p>-11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8">
            <text:p>-1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4">
            <text:p>-10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7">
            <text:p>-9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2">
            <text:p>-8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17">
            <text:p>-8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51">
            <text:p>-7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7">
            <text:p>-6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55">
            <text:p>-6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6">
            <text:p>-6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8">
            <text:p>-5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3">
            <text:p>-5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7">
            <text:p>-5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9">
            <text:p>-5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6">
            <text:p>-5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2">
            <text:p>-5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7">
            <text:p>-5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9">
            <text:p>-5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8">
            <text:p>-5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4">
            <text:p>-5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0">
            <text:p>-5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9">
            <text:p>-5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1">
            <text:p>-6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1">
            <text:p>-6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53">
            <text:p>-6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1">
            <text:p>-6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85">
            <text:p>-6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9">
            <text:p>-6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4">
            <text:p>-7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32">
            <text:p>-7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9">
            <text:p>-7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60">
            <text:p>-7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6">
            <text:p>-7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3">
            <text:p>-7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59">
            <text:p>-7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35">
            <text:p>-7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2">
            <text:p>-7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0">
            <text:p>-6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8">
            <text:p>-6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7">
            <text:p>-6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7">
            <text:p>-6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8">
            <text:p>-6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9">
            <text:p>-5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0">
            <text:p>-5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2">
            <text:p>-5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5">
            <text:p>-5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8">
            <text:p>-5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2">
            <text:p>-5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7">
            <text:p>-4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1">
            <text:p>-4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7">
            <text:p>-4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42">
            <text:p>-4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9">
            <text:p>-4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5">
            <text:p>-4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2">
            <text:p>-4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0">
            <text:p>-3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7">
            <text:p>-3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6">
            <text:p>-3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4">
            <text:p>-3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3">
            <text:p>-3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2">
            <text:p>-3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2">
            <text:p>-3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2">
            <text:p>-3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2">
            <text:p>-3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3">
            <text:p>-2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4">
            <text:p>-2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5">
            <text:p>-2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6">
            <text:p>-2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8">
            <text:p>-2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0">
            <text:p>-2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2">
            <text:p>-2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4">
            <text:p>-2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7">
            <text:p>-2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0">
            <text:p>-2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3">
            <text:p>-2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6">
            <text:p>-2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0">
            <text:p>-2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4">
            <text:p>-1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8">
            <text:p>-1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2">
            <text:p>-1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6">
            <text:p>-1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1">
            <text:p>-1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5">
            <text:p>-1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0">
            <text:p>-1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5">
            <text:p>-1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0">
            <text:p>-1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6">
            <text:p>-1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1">
            <text:p>-1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7">
            <text:p>-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2">
            <text:p>-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">
            <text:p>-1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">
            <text:p>-1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4">
            <text:p>8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3">
            <text:p>13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55">
            <text:p>18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03">
            <text:p>24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60">
            <text:p>29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8">
            <text:p>13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12">
            <text:p>13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70">
            <text:p>12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30">
            <text:p>12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92">
            <text:p>11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54">
            <text:p>1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20">
            <text:p>11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85">
            <text:p>10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51">
            <text:p>10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19">
            <text:p>10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87">
            <text:p>9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6">
            <text:p>9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7">
            <text:p>9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97">
            <text:p>8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0">
            <text:p>8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2">
            <text:p>8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6">
            <text:p>8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1">
            <text:p>7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6">
            <text:p>7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2">
            <text:p>7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8">
            <text:p>7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6">
            <text:p>6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75">
            <text:p>6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3">
            <text:p>6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3">
            <text:p>6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3">
            <text:p>6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4">
            <text:p>5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6">
            <text:p>5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8">
            <text:p>5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0">
            <text:p>5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3">
            <text:p>5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7">
            <text:p>5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1">
            <text:p>4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6">
            <text:p>4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2">
            <text:p>4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6">
            <text:p>4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7">
            <text:p>4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2">
            <text:p>3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1">
            <text:p>3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7">
            <text:p>3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6">
            <text:p>3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6">
            <text:p>3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6">
            <text:p>3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6">
            <text:p>3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5">
            <text:p>2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8">
            <text:p>2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0">
            <text:p>2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1">
            <text:p>2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6">
            <text:p>2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8">
            <text:p>2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2">
            <text:p>2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1">
            <text:p>2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6">
            <text:p>1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8">
            <text:p>1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1">
            <text:p>1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7">
            <text:p>1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2">
            <text:p>1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2">
            <text:p>1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8">
            <text:p>1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4">
            <text:p>1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1">
            <text:p>1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2">
            <text:p>1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0">
            <text:p>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">
            <text:p>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78">
            <text:p>17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18">
            <text:p>12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3">
            <text:p>6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1">
            <text:p>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7">
            <text:p>-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93">
            <text:p>-5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9">
            <text:p>-8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58">
            <text:p>-10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9">
            <text:p>-11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74">
            <text:p>-12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04">
            <text:p>-13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5">
            <text:p>-12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6">
            <text:p>-12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1">
            <text:p>-1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17">
            <text:p>-11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2">
            <text:p>-10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40">
            <text:p>-9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5">
            <text:p>-8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79">
            <text:p>-7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2">
            <text:p>-7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6">
            <text:p>-6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4">
            <text:p>-5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9">
            <text:p>-5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3">
            <text:p>-4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9">
            <text:p>-4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2">
            <text:p>-3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1">
            <text:p>-3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2">
            <text:p>-3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4">
            <text:p>-2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3">
            <text:p>-2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5">
            <text:p>-2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5">
            <text:p>-2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1">
            <text:p>-2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2">
            <text:p>-2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4">
            <text:p>-2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0">
            <text:p>-2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4">
            <text:p>-2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3">
            <text:p>-2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8">
            <text:p>-2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0">
            <text:p>-1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7">
            <text:p>-1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5">
            <text:p>-1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4">
            <text:p>-1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1">
            <text:p>-1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7">
            <text:p>-1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8">
            <text:p>-1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1">
            <text:p>-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0">
            <text:p>-1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6">
            <text:p>-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8">
            <text:p>-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1">
            <text:p>-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1">
            <text:p>-1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6">
            <text:p>-1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7">
            <text:p>-1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9">
            <text:p>-1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3">
            <text:p>-1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1">
            <text:p>-1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2">
            <text:p>-2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8">
            <text:p>-2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7">
            <text:p>-2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1">
            <text:p>-2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4">
            <text:p>-2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6">
            <text:p>-3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2">
            <text:p>-3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7">
            <text:p>-3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8">
            <text:p>-3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6">
            <text:p>-3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0">
            <text:p>-3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9">
            <text:p>-3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9">
            <text:p>-3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4">
            <text:p>-3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9">
            <text:p>-3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1">
            <text:p>-3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1">
            <text:p>-2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4">
            <text:p>-2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9">
            <text:p>-2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1">
            <text:p>-1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1">
            <text:p>-1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7">
            <text:p>-1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">
            <text:p>-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5">
            <text:p>-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">
            <text:p>-1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7">
            <text:p>-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5">
            <text:p>-1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5">
            <text:p>-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2">
            <text:p>-1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0">
            <text:p>-1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5">
            <text:p>-1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7">
            <text:p>-1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4">
            <text:p>-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3">
            <text:p>-1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8">
            <text:p>-1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7">
            <text:p>-1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3">
            <text:p>-1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">
            <text:p>-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">
            <text:p>-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8">
            <text:p>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6">
            <text:p>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0">
            <text:p>1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8">
            <text:p>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1">
            <text:p>3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0">
            <text:p>3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2">
            <text:p>3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0">
            <text:p>3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3">
            <text:p>4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2">
            <text:p>4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8">
            <text:p>4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1">
            <text:p>4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9">
            <text:p>5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3">
            <text:p>5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2">
            <text:p>6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0">
            <text:p>7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13">
            <text:p>9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82">
            <text:p>10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7">
            <text:p>12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26">
            <text:p>15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12">
            <text:p>18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89">
            <text:p>20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8">
            <text:p>15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0">
            <text:p>4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1">
            <text:p>4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6">
            <text:p>4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7">
            <text:p>4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4">
            <text:p>3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2">
            <text:p>3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8">
            <text:p>3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7">
            <text:p>3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6">
            <text:p>3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6">
            <text:p>3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6">
            <text:p>3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6">
            <text:p>3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2">
            <text:p>2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8">
            <text:p>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3">
            <text:p>2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6">
            <text:p>2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0">
            <text:p>2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3">
            <text:p>2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0">
            <text:p>1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3">
            <text:p>1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8">
            <text:p>1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2">
            <text:p>1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3">
            <text:p>1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4">
            <text:p>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8">
            <text:p>1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4">
            <text:p>1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5">
            <text:p>1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1">
            <text:p>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9">
            <text:p>1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4">
            <text:p>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7">
            <text:p>1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5">
            <text:p>1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">
            <text:p>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1">
            <text:p>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9">
            <text:p>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">
            <text:p>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2">
            <text:p>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">
            <text:p>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">
            <text:p>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">
            <text:p>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">
            <text:p>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80">
            <text:p>16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3">
            <text:p>10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0">
            <text:p>4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">
            <text:p>-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1">
            <text:p>-5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8">
            <text:p>-8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00">
            <text:p>-12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33">
            <text:p>-14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93">
            <text:p>-15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90">
            <text:p>-16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37">
            <text:p>-16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86">
            <text:p>-15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36">
            <text:p>-15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88">
            <text:p>-14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42">
            <text:p>-14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97">
            <text:p>-13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53">
            <text:p>-13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11">
            <text:p>-13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70">
            <text:p>-12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0">
            <text:p>-12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92">
            <text:p>-11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7">
            <text:p>-10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4">
            <text:p>-9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79">
            <text:p>-8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76">
            <text:p>-7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7">
            <text:p>-6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4">
            <text:p>-6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6">
            <text:p>-5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6">
            <text:p>-4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7">
            <text:p>-4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3">
            <text:p>-3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4">
            <text:p>-3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2">
            <text:p>-2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4">
            <text:p>-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4">
            <text:p>-1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7">
            <text:p>-1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">
            <text:p>-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">
            <text:p>-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">
            <text:p>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5">
            <text:p>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5">
            <text:p>1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3">
            <text:p>2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0">
            <text:p>2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8">
            <text:p>2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1">
            <text:p>2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7">
            <text:p>1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2">
            <text:p>1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7">
            <text:p>1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1">
            <text:p>1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3">
            <text:p>1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1">
            <text:p>1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4">
            <text:p>1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6">
            <text:p>1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5">
            <text:p>2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1">
            <text:p>3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5">
            <text:p>4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5">
            <text:p>6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5">
            <text:p>7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48">
            <text:p>9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55">
            <text:p>11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03">
            <text:p>14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58">
            <text:p>16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35">
            <text:p>19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72">
            <text:p>16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5">
            <text:p>3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2">
            <text:p>3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2">
            <text:p>3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4">
            <text:p>2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4">
            <text:p>2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6">
            <text:p>2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8">
            <text:p>2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7">
            <text:p>2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2">
            <text:p>2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8">
            <text:p>1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2">
            <text:p>1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6">
            <text:p>1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1">
            <text:p>1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1">
            <text:p>1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5">
            <text:p>1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2">
            <text:p>1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7">
            <text:p>1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1">
            <text:p>1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7">
            <text:p>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1">
            <text:p>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5">
            <text:p>1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2">
            <text:p>1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3">
            <text:p>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0">
            <text:p>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4">
            <text:p>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">
            <text:p>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">
            <text:p>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9">
            <text:p>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">
            <text:p>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3">
            <text:p>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">
            <text:p>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">
            <text:p>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">
            <text:p>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">
            <text:p>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">
            <text:p>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">
            <text:p>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">
            <text:p>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">
            <text:p>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">
            <text:p>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70">
            <text:p>16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00">
            <text:p>1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4">
            <text:p>5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9">
            <text:p>-3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71">
            <text:p>-6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1">
            <text:p>-9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8">
            <text:p>-1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41">
            <text:p>-13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41">
            <text:p>-14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90">
            <text:p>-14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03">
            <text:p>-15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88">
            <text:p>-14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56">
            <text:p>-14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87">
            <text:p>-13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03">
            <text:p>-13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25">
            <text:p>-12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27">
            <text:p>-11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2">
            <text:p>-10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5">
            <text:p>-9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6">
            <text:p>-8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55">
            <text:p>-7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54">
            <text:p>-6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2">
            <text:p>-5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7">
            <text:p>-4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6">
            <text:p>-4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6">
            <text:p>-3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9">
            <text:p>-2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5">
            <text:p>-2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7">
            <text:p>-2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9">
            <text:p>-2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6">
            <text:p>-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2">
            <text:p>-1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8">
            <text:p>-1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5">
            <text:p>-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5">
            <text:p>-1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2">
            <text:p>-1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3">
            <text:p>-1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1">
            <text:p>-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">
            <text:p>-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">
            <text:p>-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">
            <text:p>-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">
            <text:p>-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">
            <text:p>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">
            <text:p>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">
            <text:p>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">
            <text:p>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">
            <text:p>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">
            <text:p>-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">
            <text:p>-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">
            <text:p>-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9">
            <text:p>-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">
            <text:p>-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2">
            <text:p>-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">
            <text:p>-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">
            <text:p>-1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7">
            <text:p>-1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9">
            <text:p>-1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">
            <text:p>-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">
            <text:p>-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">
            <text:p>-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6">
            <text:p>2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8">
            <text:p>3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6">
            <text:p>5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3">
            <text:p>7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7">
            <text:p>9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96">
            <text:p>11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53">
            <text:p>14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37">
            <text:p>17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23">
            <text:p>20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9">
            <text:p>12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2">
            <text:p>3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1">
            <text:p>3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0">
            <text:p>3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1">
            <text:p>3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1">
            <text:p>2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2">
            <text:p>2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7">
            <text:p>2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8">
            <text:p>2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1">
            <text:p>2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2">
            <text:p>2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6">
            <text:p>2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8">
            <text:p>1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3">
            <text:p>1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7">
            <text:p>1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1">
            <text:p>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1">
            <text:p>1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4">
            <text:p>1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1">
            <text:p>1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6">
            <text:p>1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1">
            <text:p>1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7">
            <text:p>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8">
            <text:p>1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0">
            <text:p>1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5">
            <text:p>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2">
            <text:p>1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0">
            <text:p>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3">
            <text:p>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6">
            <text:p>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9">
            <text:p>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">
            <text:p>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">
            <text:p>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">
            <text:p>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">
            <text:p>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2">
            <text:p>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">
            <text:p>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">
            <text:p>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">
            <text:p>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">
            <text:p>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">
            <text:p>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">
            <text:p>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50">
            <text:p>15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07">
            <text:p>13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6">
            <text:p>8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5">
            <text:p>3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9">
            <text:p>-3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6">
            <text:p>-5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2">
            <text:p>-7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5">
            <text:p>-9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53">
            <text:p>-10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21">
            <text:p>-11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0">
            <text:p>-11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6">
            <text:p>-11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26">
            <text:p>-11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0">
            <text:p>-1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55">
            <text:p>-10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06">
            <text:p>-10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54">
            <text:p>-9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01">
            <text:p>-9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4">
            <text:p>-8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59">
            <text:p>-7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8">
            <text:p>-6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5">
            <text:p>-6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7">
            <text:p>-5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8">
            <text:p>-5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1">
            <text:p>-4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4">
            <text:p>-4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9">
            <text:p>-4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1">
            <text:p>-4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1">
            <text:p>-3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9">
            <text:p>-3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4">
            <text:p>-3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8">
            <text:p>-3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5">
            <text:p>-3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0">
            <text:p>-3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9">
            <text:p>-3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1">
            <text:p>-3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5">
            <text:p>-3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8">
            <text:p>-3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6">
            <text:p>-3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0">
            <text:p>-3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0">
            <text:p>-3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6">
            <text:p>-3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5">
            <text:p>-3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6">
            <text:p>-3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0">
            <text:p>-3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5">
            <text:p>-3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5">
            <text:p>-3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9">
            <text:p>-3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8">
            <text:p>-3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5">
            <text:p>-3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3">
            <text:p>-3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6">
            <text:p>-2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1">
            <text:p>-2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1">
            <text:p>-2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6">
            <text:p>-2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4">
            <text:p>-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5">
            <text:p>-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5">
            <text:p>-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4">
            <text:p>-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">
            <text:p>-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">
            <text:p>-1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7">
            <text:p>-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0">
            <text:p>-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">
            <text:p>-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4">
            <text:p>-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4">
            <text:p>-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">
            <text:p>-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">
            <text:p>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">
            <text:p>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">
            <text:p>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">
            <text:p>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">
            <text:p>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5">
            <text:p>1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4">
            <text:p>4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2">
            <text:p>6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9">
            <text:p>7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45">
            <text:p>9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65">
            <text:p>11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09">
            <text:p>14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59">
            <text:p>16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37">
            <text:p>19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58">
            <text:p>21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6">
            <text:p>4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6">
            <text:p>3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5">
            <text:p>3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3">
            <text:p>3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4">
            <text:p>2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6">
            <text:p>2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1">
            <text:p>2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6">
            <text:p>2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0">
            <text:p>2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2">
            <text:p>2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6">
            <text:p>1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0">
            <text:p>1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7">
            <text:p>1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2">
            <text:p>1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7">
            <text:p>1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1">
            <text:p>1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7">
            <text:p>1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2">
            <text:p>1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0">
            <text:p>1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6">
            <text:p>1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2">
            <text:p>1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4">
            <text:p>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7">
            <text:p>1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4">
            <text:p>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6">
            <text:p>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">
            <text:p>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0">
            <text:p>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">
            <text:p>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3">
            <text:p>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">
            <text:p>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2">
            <text:p>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">
            <text:p>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">
            <text:p>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">
            <text:p>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">
            <text:p>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03">
            <text:p>1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53">
            <text:p>13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6">
            <text:p>8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6">
            <text:p>3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5">
            <text:p>-3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4">
            <text:p>-6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21">
            <text:p>-8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2">
            <text:p>-9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2">
            <text:p>-10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10">
            <text:p>-1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7">
            <text:p>-1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6">
            <text:p>-1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8">
            <text:p>-10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16">
            <text:p>-10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46">
            <text:p>-9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8">
            <text:p>-8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5">
            <text:p>-7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4">
            <text:p>-7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3">
            <text:p>-6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6">
            <text:p>-5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3">
            <text:p>-4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0">
            <text:p>-4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8">
            <text:p>-3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0">
            <text:p>-3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3">
            <text:p>-3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0">
            <text:p>-3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2">
            <text:p>-2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3">
            <text:p>-2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5">
            <text:p>-2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6">
            <text:p>-2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2">
            <text:p>-2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6">
            <text:p>-2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7">
            <text:p>-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4">
            <text:p>-2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5">
            <text:p>-2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1">
            <text:p>-2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9">
            <text:p>-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9">
            <text:p>-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4">
            <text:p>-2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0">
            <text:p>-2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3">
            <text:p>-2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8">
            <text:p>-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7">
            <text:p>-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8">
            <text:p>-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4">
            <text:p>-2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8">
            <text:p>-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3">
            <text:p>-2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3">
            <text:p>-2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7">
            <text:p>-2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0">
            <text:p>-2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2">
            <text:p>-2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9">
            <text:p>-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9">
            <text:p>-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6">
            <text:p>-2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2">
            <text:p>-2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6">
            <text:p>-2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4">
            <text:p>-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2">
            <text:p>-2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8">
            <text:p>-1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1">
            <text:p>-1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4">
            <text:p>-1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0">
            <text:p>-1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">
            <text:p>-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">
            <text:p>-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">
            <text:p>-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">
            <text:p>-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4">
            <text:p>-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">
            <text:p>-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">
            <text:p>-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">
            <text:p>-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">
            <text:p>-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">
            <text:p>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0">
            <text:p>1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1">
            <text:p>4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8">
            <text:p>7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9">
            <text:p>9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46">
            <text:p>12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7">
            <text:p>15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09">
            <text:p>18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96">
            <text:p>20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6">
            <text:p>3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6">
            <text:p>3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8">
            <text:p>3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2">
            <text:p>2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7">
            <text:p>2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7">
            <text:p>2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1">
            <text:p>2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3">
            <text:p>1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6">
            <text:p>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4">
            <text:p>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7">
            <text:p>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3">
            <text:p>1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8">
            <text:p>1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5">
            <text:p>1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0">
            <text:p>1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7">
            <text:p>1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4">
            <text:p>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9">
            <text:p>1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1">
            <text:p>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7">
            <text:p>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">
            <text:p>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0">
            <text:p>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">
            <text:p>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">
            <text:p>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">
            <text:p>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">
            <text:p>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7">
            <text:p>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">
            <text:p>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">
            <text:p>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">
            <text:p>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">
            <text:p>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">
            <text:p>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">
            <text:p>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">
            <text:p>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">
            <text:p>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4">
            <text:p>5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88">
            <text:p>13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6">
            <text:p>8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8">
            <text:p>3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3">
            <text:p>-1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9">
            <text:p>-5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09">
            <text:p>-8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9">
            <text:p>-10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13">
            <text:p>-12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27">
            <text:p>-13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98">
            <text:p>-13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28">
            <text:p>-14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05">
            <text:p>-14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73">
            <text:p>-13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16">
            <text:p>-13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9">
            <text:p>-1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50">
            <text:p>-11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68">
            <text:p>-10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3">
            <text:p>-9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5">
            <text:p>-8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1">
            <text:p>-7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2">
            <text:p>-6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9">
            <text:p>-6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4">
            <text:p>-5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0">
            <text:p>-4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4">
            <text:p>-3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2">
            <text:p>-3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5">
            <text:p>-2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1">
            <text:p>-2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5">
            <text:p>-1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7">
            <text:p>-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">
            <text:p>-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">
            <text:p>-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">
            <text:p>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">
            <text:p>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">
            <text:p>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">
            <text:p>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">
            <text:p>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">
            <text:p>-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">
            <text:p>-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">
            <text:p>-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">
            <text:p>-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">
            <text:p>-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">
            <text:p>-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">
            <text:p>-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">
            <text:p>-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3">
            <text:p>-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">
            <text:p>-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">
            <text:p>-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">
            <text:p>-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">
            <text:p>-1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5">
            <text:p>-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">
            <text:p>-1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2">
            <text:p>-1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1">
            <text:p>-1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">
            <text:p>-1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6">
            <text:p>-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">
            <text:p>-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">
            <text:p>-1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">
            <text:p>-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5">
            <text:p>-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1">
            <text:p>-1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">
            <text:p>-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">
            <text:p>-1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2">
            <text:p>-1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8">
            <text:p>-1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7">
            <text:p>-1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6">
            <text:p>-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3">
            <text:p>-1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3">
            <text:p>-1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0">
            <text:p>-1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4">
            <text:p>-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6">
            <text:p>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6">
            <text:p>2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1">
            <text:p>4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4">
            <text:p>6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4">
            <text:p>8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37">
            <text:p>1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41">
            <text:p>14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68">
            <text:p>17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96">
            <text:p>20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5">
            <text:p>6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1">
            <text:p>3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8">
            <text:p>3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6">
            <text:p>3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6">
            <text:p>3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5">
            <text:p>3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6">
            <text:p>2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7">
            <text:p>2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1">
            <text:p>2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7">
            <text:p>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0">
            <text:p>2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2">
            <text:p>2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0">
            <text:p>2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1">
            <text:p>2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6">
            <text:p>1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7">
            <text:p>1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2">
            <text:p>1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7">
            <text:p>1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3">
            <text:p>1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8">
            <text:p>1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3">
            <text:p>1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3">
            <text:p>1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6">
            <text:p>1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2">
            <text:p>1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4">
            <text:p>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3">
            <text:p>1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4">
            <text:p>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">
            <text:p>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8">
            <text:p>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">
            <text:p>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3">
            <text:p>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">
            <text:p>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">
            <text:p>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">
            <text:p>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7">
            <text:p>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">
            <text:p>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">
            <text:p>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">
            <text:p>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">
            <text:p>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">
            <text:p>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">
            <text:p>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78">
            <text:p>13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03">
            <text:p>12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2">
            <text:p>5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9">
            <text:p>-4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77">
            <text:p>-8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25">
            <text:p>-12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73">
            <text:p>-14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73">
            <text:p>-16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71">
            <text:p>-16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19">
            <text:p>-16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68">
            <text:p>-15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19">
            <text:p>-15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72">
            <text:p>-14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26">
            <text:p>-14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81">
            <text:p>-13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38">
            <text:p>-13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96">
            <text:p>-12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56">
            <text:p>-12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17">
            <text:p>-12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9">
            <text:p>-11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2">
            <text:p>-11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06">
            <text:p>-1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2">
            <text:p>-10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8">
            <text:p>-10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06">
            <text:p>-10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74">
            <text:p>-9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44">
            <text:p>-9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4">
            <text:p>-9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86">
            <text:p>-8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8">
            <text:p>-8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1">
            <text:p>-8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05">
            <text:p>-8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0">
            <text:p>-7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56">
            <text:p>-7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32">
            <text:p>-7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9">
            <text:p>-7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87">
            <text:p>-6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6">
            <text:p>-6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5">
            <text:p>-6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5">
            <text:p>-6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5">
            <text:p>-6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6">
            <text:p>-5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8">
            <text:p>-5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8">
            <text:p>-5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4">
            <text:p>-5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4">
            <text:p>-4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0">
            <text:p>-4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2">
            <text:p>-4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3">
            <text:p>-3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2">
            <text:p>-3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9">
            <text:p>-3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1">
            <text:p>-3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6">
            <text:p>-3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3">
            <text:p>-3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4">
            <text:p>-3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7">
            <text:p>-3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4">
            <text:p>-3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8">
            <text:p>-3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1">
            <text:p>-3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0">
            <text:p>-3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9">
            <text:p>-3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8">
            <text:p>-3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8">
            <text:p>-3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8">
            <text:p>-3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9">
            <text:p>-2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9">
            <text:p>-2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0">
            <text:p>-2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1">
            <text:p>-2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3">
            <text:p>-2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7">
            <text:p>-2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3">
            <text:p>-2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7">
            <text:p>-1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6">
            <text:p>-1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5">
            <text:p>-1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">
            <text:p>-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0">
            <text:p>-1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">
            <text:p>-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">
            <text:p>-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">
            <text:p>-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3">
            <text:p>1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1">
            <text:p>2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9">
            <text:p>5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7">
            <text:p>7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01">
            <text:p>9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21">
            <text:p>11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78">
            <text:p>13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66">
            <text:p>16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97">
            <text:p>19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43">
            <text:p>23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14">
            <text:p>27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85">
            <text:p>14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3">
            <text:p>10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29">
            <text:p>10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7">
            <text:p>9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66">
            <text:p>9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37">
            <text:p>9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07">
            <text:p>9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8">
            <text:p>8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3">
            <text:p>8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5">
            <text:p>8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4">
            <text:p>7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1">
            <text:p>7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27">
            <text:p>7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3">
            <text:p>7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2">
            <text:p>6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1">
            <text:p>6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1">
            <text:p>6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1">
            <text:p>6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1">
            <text:p>6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3">
            <text:p>5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5">
            <text:p>5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7">
            <text:p>5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9">
            <text:p>5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4">
            <text:p>5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8">
            <text:p>4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2">
            <text:p>4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6">
            <text:p>4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2">
            <text:p>4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5">
            <text:p>4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1">
            <text:p>4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7">
            <text:p>3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3">
            <text:p>3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1">
            <text:p>3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1">
            <text:p>2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1">
            <text:p>2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2">
            <text:p>2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3">
            <text:p>2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7">
            <text:p>2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2">
            <text:p>2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8">
            <text:p>1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3">
            <text:p>1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6">
            <text:p>1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3">
            <text:p>1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6">
            <text:p>1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5">
            <text:p>1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9">
            <text:p>1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6">
            <text:p>1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3">
            <text:p>1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8">
            <text:p>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4">
            <text:p>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1">
            <text:p>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7">
            <text:p>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">
            <text:p>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">
            <text:p>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8">
            <text:p>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">
            <text:p>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">
            <text:p>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">
            <text:p>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">
            <text:p>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">
            <text:p>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1">
            <text:p>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">
            <text:p>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">
            <text:p>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0">
            <text:p>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83">
            <text:p>13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6">
            <text:p>5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1">
            <text:p>-1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2">
            <text:p>-8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47">
            <text:p>-14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10">
            <text:p>-17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57">
            <text:p>-16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05">
            <text:p>-16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55">
            <text:p>-15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06">
            <text:p>-15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59">
            <text:p>-14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14">
            <text:p>-14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69">
            <text:p>-13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27">
            <text:p>-13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5">
            <text:p>-12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5">
            <text:p>-12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06">
            <text:p>-12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68">
            <text:p>-11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2">
            <text:p>-1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6">
            <text:p>-10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62">
            <text:p>-10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29">
            <text:p>-10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97">
            <text:p>-9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6">
            <text:p>-9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6">
            <text:p>-9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06">
            <text:p>-9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78">
            <text:p>-8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51">
            <text:p>-8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24">
            <text:p>-8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98">
            <text:p>-7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73">
            <text:p>-7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9">
            <text:p>-7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26">
            <text:p>-7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03">
            <text:p>-7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81">
            <text:p>-6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0">
            <text:p>-6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9">
            <text:p>-6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9">
            <text:p>-6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0">
            <text:p>-6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1">
            <text:p>-5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3">
            <text:p>-5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5">
            <text:p>-5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8">
            <text:p>-5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2">
            <text:p>-5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6">
            <text:p>-4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0">
            <text:p>-4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5">
            <text:p>-4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1">
            <text:p>-4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7">
            <text:p>-4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3">
            <text:p>-4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10">
            <text:p>-4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7">
            <text:p>-3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5">
            <text:p>-3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">
            <text:p>-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1">
            <text:p>5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3">
            <text:p>7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3">
            <text:p>9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5">
            <text:p>1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62">
            <text:p>13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98">
            <text:p>14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03">
            <text:p>16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79">
            <text:p>16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52">
            <text:p>17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82">
            <text:p>17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04">
            <text:p>18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08">
            <text:p>18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97">
            <text:p>17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71">
            <text:p>17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42">
            <text:p>17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85">
            <text:p>16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2">
            <text:p>16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62">
            <text:p>15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92">
            <text:p>14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14">
            <text:p>14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31">
            <text:p>13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45">
            <text:p>12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56">
            <text:p>11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52">
            <text:p>10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69">
            <text:p>9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3">
            <text:p>8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9">
            <text:p>7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8">
            <text:p>7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5">
            <text:p>6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7">
            <text:p>5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4">
            <text:p>5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1">
            <text:p>5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7">
            <text:p>5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3">
            <text:p>6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32">
            <text:p>8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08">
            <text:p>10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26">
            <text:p>12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96">
            <text:p>14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40">
            <text:p>9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">
            <text:p>-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4">
            <text:p>-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1">
            <text:p>-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9">
            <text:p>-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5">
            <text:p>-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">
            <text:p>-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">
            <text:p>-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8">
            <text:p>-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">
            <text:p>-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5">
            <text:p>-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">
            <text:p>-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">
            <text:p>-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9">
            <text:p>-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">
            <text:p>-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">
            <text:p>-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">
            <text:p>-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">
            <text:p>-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">
            <text:p>-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">
            <text:p>-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">
            <text:p>-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5">
            <text:p>-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">
            <text:p>-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">
            <text:p>-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">
            <text:p>-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">
            <text:p>-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">
            <text:p>-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">
            <text:p>-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">
            <text:p>-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">
            <text:p>-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">
            <text:p>-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">
            <text:p>-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">
            <text:p>-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">
            <text:p>-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">
            <text:p>-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">
            <text:p>-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8">
            <text:p>-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7">
            <text:p>-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">
            <text:p>-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">
            <text:p>-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">
            <text:p>-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4">
            <text:p>-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">
            <text:p>-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">
            <text:p>-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">
            <text:p>-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1">
            <text:p>-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0">
            <text:p>-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">
            <text:p>-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">
            <text:p>-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">
            <text:p>-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8">
            <text:p>-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">
            <text:p>-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">
            <text:p>-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">
            <text:p>-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">
            <text:p>-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">
            <text:p>-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">
            <text:p>-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">
            <text:p>-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">
            <text:p>-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">
            <text:p>-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">
            <text:p>-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">
            <text:p>-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">
            <text:p>-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">
            <text:p>-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">
            <text:p>-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44">
            <text:p>11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0">
            <text:p>1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2">
            <text:p>3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1">
            <text:p>-2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3">
            <text:p>-8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26">
            <text:p>-13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21">
            <text:p>-17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34">
            <text:p>-17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80">
            <text:p>-16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28">
            <text:p>-16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77">
            <text:p>-15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28">
            <text:p>-15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80">
            <text:p>-14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34">
            <text:p>-14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89">
            <text:p>-13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45">
            <text:p>-13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03">
            <text:p>-13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63">
            <text:p>-12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23">
            <text:p>-12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5">
            <text:p>-1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8">
            <text:p>-11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12">
            <text:p>-11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77">
            <text:p>-10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4">
            <text:p>-10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11">
            <text:p>-10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79">
            <text:p>-9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49">
            <text:p>-9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19">
            <text:p>-9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90">
            <text:p>-8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63">
            <text:p>-8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36">
            <text:p>-8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10">
            <text:p>-8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84">
            <text:p>-7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60">
            <text:p>-7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36">
            <text:p>-7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13">
            <text:p>-7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1">
            <text:p>-6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9">
            <text:p>-6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48">
            <text:p>-6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28">
            <text:p>-6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08">
            <text:p>-6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89">
            <text:p>-5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1">
            <text:p>-5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3">
            <text:p>-5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36">
            <text:p>-5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19">
            <text:p>-5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3">
            <text:p>-5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87">
            <text:p>-4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2">
            <text:p>-4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7">
            <text:p>-3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4">
            <text:p>-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">
            <text:p>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6">
            <text:p>4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3">
            <text:p>6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6">
            <text:p>7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0">
            <text:p>9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3">
            <text:p>11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04">
            <text:p>14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6">
            <text:p>16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08">
            <text:p>19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89">
            <text:p>21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16">
            <text:p>25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7">
            <text:p>13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2">
            <text:p>85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6">
            <text:p>8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1">
            <text:p>8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5">
            <text:p>7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3">
            <text:p>7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29">
            <text:p>7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5">
            <text:p>7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3">
            <text:p>6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63">
            <text:p>6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2">
            <text:p>6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3">
            <text:p>6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03">
            <text:p>60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4">
            <text:p>5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6">
            <text:p>5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8">
            <text:p>5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1">
            <text:p>5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4">
            <text:p>5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8">
            <text:p>4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3">
            <text:p>4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8">
            <text:p>4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3">
            <text:p>4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5">
            <text:p>4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2">
            <text:p>4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7">
            <text:p>3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3">
            <text:p>3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3">
            <text:p>3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2">
            <text:p>3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0">
            <text:p>3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1">
            <text:p>3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0">
            <text:p>3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1">
            <text:p>2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2">
            <text:p>2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2">
            <text:p>2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6">
            <text:p>2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8">
            <text:p>2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8">
            <text:p>2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2">
            <text:p>21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3">
            <text:p>1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7">
            <text:p>1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0">
            <text:p>1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4">
            <text:p>1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6">
            <text:p>1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6">
            <text:p>1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4">
            <text:p>1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9">
            <text:p>1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5">
            <text:p>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7">
            <text:p>1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">
            <text:p>1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1">
            <text:p>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6">
            <text:p>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">
            <text:p>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9">
            <text:p>8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">
            <text:p>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">
            <text:p>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">
            <text:p>8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">
            <text:p>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">
            <text:p>7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">
            <text:p>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">
            <text:p>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7">
            <text:p>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">
            <text:p>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">
            <text:p>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">
            <text:p>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">
            <text:p>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">
            <text:p>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">
            <text:p>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">
            <text:p>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4">
            <text:p>4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67">
            <text:p>13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35">
            <text:p>7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3">
            <text:p>1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8">
            <text:p>-3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20">
            <text:p>-8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85">
            <text:p>-1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95">
            <text:p>-14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701">
            <text:p>-17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48">
            <text:p>-16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96">
            <text:p>-15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46">
            <text:p>-15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98">
            <text:p>-14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51">
            <text:p>-14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06">
            <text:p>-14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62">
            <text:p>-13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19">
            <text:p>-131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78">
            <text:p>-12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8">
            <text:p>-1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99">
            <text:p>-11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62">
            <text:p>-11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26">
            <text:p>-11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0">
            <text:p>-10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56">
            <text:p>-10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23">
            <text:p>-10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91">
            <text:p>-9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0">
            <text:p>-9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0">
            <text:p>-9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01">
            <text:p>-9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73">
            <text:p>-8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46">
            <text:p>-8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20">
            <text:p>-8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94">
            <text:p>-7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69">
            <text:p>-76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5">
            <text:p>-7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22">
            <text:p>-7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99">
            <text:p>-6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77">
            <text:p>-6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56">
            <text:p>-6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36">
            <text:p>-6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16">
            <text:p>-6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97">
            <text:p>-5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8">
            <text:p>-5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60">
            <text:p>-5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42">
            <text:p>-5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25">
            <text:p>-5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9">
            <text:p>-5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93">
            <text:p>-4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8">
            <text:p>-4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63">
            <text:p>-4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48">
            <text:p>-4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34">
            <text:p>-4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1">
            <text:p>-4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08">
            <text:p>-4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95">
            <text:p>-3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83">
            <text:p>-3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71">
            <text:p>-3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59">
            <text:p>-3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48">
            <text:p>-3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37">
            <text:p>-3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26">
            <text:p>-3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16">
            <text:p>-3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6">
            <text:p>-3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97">
            <text:p>-2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54">
            <text:p>-2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6">
            <text:p>-1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2">
            <text:p>-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">
            <text:p>-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8">
            <text:p>2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3">
            <text:p>2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6">
            <text:p>2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1">
            <text:p>3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8">
            <text:p>3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4">
            <text:p>4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8">
            <text:p>6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0">
            <text:p>80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92">
            <text:p>9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22">
            <text:p>12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06">
            <text:p>15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23">
            <text:p>18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77">
            <text:p>21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56">
            <text:p>25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27">
            <text:p>15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7">
            <text:p>95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27">
            <text:p>9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99">
            <text:p>8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71">
            <text:p>8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44">
            <text:p>8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17">
            <text:p>8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92">
            <text:p>79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67">
            <text:p>7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3">
            <text:p>7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20">
            <text:p>7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98">
            <text:p>6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77">
            <text:p>6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5">
            <text:p>6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5">
            <text:p>6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6">
            <text:p>6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7">
            <text:p>5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7">
            <text:p>5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9">
            <text:p>5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3">
            <text:p>5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4">
            <text:p>5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09">
            <text:p>5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3">
            <text:p>4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8">
            <text:p>4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3">
            <text:p>4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5">
            <text:p>4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1">
            <text:p>4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8">
            <text:p>4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5">
            <text:p>3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3">
            <text:p>38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8">
            <text:p>3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7">
            <text:p>3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6">
            <text:p>30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1">
            <text:p>2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0">
            <text:p>2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8">
            <text:p>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3">
            <text:p>2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6">
            <text:p>2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90">
            <text:p>19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3">
            <text:p>1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8">
            <text:p>1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2">
            <text:p>1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6">
            <text:p>1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53">
            <text:p>1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7">
            <text:p>1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3">
            <text:p>1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0">
            <text:p>13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5">
            <text:p>12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2">
            <text:p>1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5">
            <text:p>11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8">
            <text:p>1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4">
            <text:p>10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1">
            <text:p>1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">
            <text:p>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1">
            <text:p>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8">
            <text:p>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6">
            <text:p>8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">
            <text:p>8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0">
            <text:p>8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5">
            <text:p>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4">
            <text:p>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0">
            <text:p>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8">
            <text:p>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5">
            <text:p>6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4">
            <text:p>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2">
            <text:p>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">
            <text:p>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">
            <text:p>5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5">
            <text:p>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3">
            <text:p>5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">
            <text:p>5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">
            <text:p>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">
            <text:p>4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">
            <text:p>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">
            <text:p>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5">
            <text:p>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">
            <text:p>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">
            <text:p>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35">
            <text:p>103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28">
            <text:p>122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75">
            <text:p>-47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97">
            <text:p>-8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38">
            <text:p>-123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13">
            <text:p>-151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93">
            <text:p>-16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60">
            <text:p>-16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08">
            <text:p>-16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58">
            <text:p>-155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509">
            <text:p>-150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62">
            <text:p>-14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416">
            <text:p>-14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72">
            <text:p>-13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29">
            <text:p>-13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87">
            <text:p>-128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47">
            <text:p>-124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208">
            <text:p>-12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70">
            <text:p>-117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34">
            <text:p>-113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98">
            <text:p>-10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64">
            <text:p>-10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031">
            <text:p>-10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99">
            <text:p>-99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67">
            <text:p>-96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937">
            <text:p>-9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844">
            <text:p>-8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62">
            <text:p>-76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660">
            <text:p>-6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72">
            <text:p>-5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05">
            <text:p>-50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26">
            <text:p>-4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61">
            <text:p>-3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301">
            <text:p>-30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61">
            <text:p>-2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23">
            <text:p>-2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93">
            <text:p>-19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66">
            <text:p>-16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37">
            <text:p>-1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114">
            <text:p>-11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74">
            <text:p>-7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55">
            <text:p>-5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23">
            <text:p>-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-4">
            <text:p>-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">
            <text:p>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">
            <text:p>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77">
            <text:p>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5">
            <text:p>8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6">
            <text:p>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95">
            <text:p>95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0">
            <text:p>1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26">
            <text:p>1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46">
            <text:p>1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77">
            <text:p>17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0">
            <text:p>22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1">
            <text:p>29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4">
            <text:p>3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84">
            <text:p>4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1">
            <text:p>63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829">
            <text:p>8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068">
            <text:p>106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344">
            <text:p>134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663">
            <text:p>16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29">
            <text:p>202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08">
            <text:p>24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71">
            <text:p>67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37">
            <text:p>63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616">
            <text:p>61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97">
            <text:p>59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60">
            <text:p>56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43">
            <text:p>54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26">
            <text:p>52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511">
            <text:p>5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94">
            <text:p>49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79">
            <text:p>4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64">
            <text:p>46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50">
            <text:p>45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36">
            <text:p>43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21">
            <text:p>42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410">
            <text:p>410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96">
            <text:p>39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84">
            <text:p>38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73">
            <text:p>37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61">
            <text:p>36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27">
            <text:p>32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17">
            <text:p>31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307">
            <text:p>307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88">
            <text:p>28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72">
            <text:p>27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63">
            <text:p>26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46">
            <text:p>246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8">
            <text:p>21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11">
            <text:p>211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3">
            <text:p>2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manifest="urn:oasis:names:tc:opendocument:xmlns:manifest:1.0" xmlns:presentation="urn:oasis:names:tc:opendocument:xmlns:presentation:1.0" office:version="1.2">
  <office:meta>
    <meta:generator>ODFPY/1.4.1</meta:generator>
  </office:meta>
</office:document-meta>
</file>